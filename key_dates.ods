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217in"/>
    </style:style>
    <style:style style:name="co5" style:family="table-column">
      <style:table-column-properties fo:break-before="auto" style:column-width="2.1161in"/>
    </style:style>
    <style:style style:name="co6" style:family="table-column">
      <style:table-column-properties fo:break-before="auto" style:column-width="4.4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6-01-28" calcext:value-type="date">
            <text:p>2026-01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. Introduction to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table:formula="of:=[.D2]+7" office:value-type="date" office:date-value="2026-02-04" calcext:value-type="date">
            <text:p>2026-0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I. Linear Algebra Foundation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table:formula="of:=[.D3]+7" office:value-type="date" office:date-value="2026-02-11" calcext:value-type="date">
            <text:p>2026-0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II. Accuracy and Loss in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table:formula="of:=[.D4]+7" office:value-type="date" office:date-value="2026-02-18" calcext:value-type="date">
            <text:p>2026-02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V. Optimization &amp; Simulation in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Instructor</text:p>
          </table:table-cell>
          <table:table-cell table:formula="of:=[.D5]+7" office:value-type="date" office:date-value="2026-02-25" calcext:value-type="date">
            <text:p>2026-02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. Regularization &amp; Ridge Regress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Instructor</text:p>
          </table:table-cell>
          <table:table-cell table:formula="of:=[.D6]+7" office:value-type="date" office:date-value="2026-03-04" calcext:value-type="date">
            <text:p>2026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I. Sparsity and the Lasso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Instructor</text:p>
          </table:table-cell>
          <table:table-cell table:formula="of:=[.D7]+7" office:value-type="date" office:date-value="2026-03-11" calcext:value-type="date">
            <text:p>2026-03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II. Generative Classifier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Instructor</text:p>
          </table:table-cell>
          <table:table-cell table:formula="of:=[.D8]+7" office:value-type="date" office:date-value="2026-03-18" calcext:value-type="date">
            <text:p>2026-03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V. Discriminative Classifiers &amp; Non-Linear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9]+1" office:value-type="float" office:value="9" calcext:value-type="float">
            <text:p>9</text:p>
          </table:table-cell>
          <table:table-cell office:value-type="string" calcext:value-type="string">
            <text:p>Instructor</text:p>
          </table:table-cell>
          <table:table-cell table:formula="of:=[.D9]+7" office:value-type="date" office:date-value="2026-03-25" calcext:value-type="date">
            <text:p>2026-03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V. Trees &amp; Ensemble Methods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0]+7" office:value-type="date" office:date-value="2026-04-01" calcext:value-type="date">
            <text:p>2026-04-01</text:p>
          </table:table-cell>
          <table:table-cell/>
          <table:table-cell office:value-type="string" calcext:value-type="string">
            <text:p>No Class: Baruch Spring Recess (Week 1 of 2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1]+7" office:value-type="date" office:date-value="2026-04-08" calcext:value-type="date">
            <text:p>2026-04-08</text:p>
          </table:table-cell>
          <table:table-cell/>
          <table:table-cell office:value-type="string" calcext:value-type="string">
            <text:p>No Class: Baruch Spring Recess (Week 2 of 2)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Instructor</text:p>
          </table:table-cell>
          <table:table-cell table:formula="of:=[.D12]+7" office:value-type="date" office:date-value="2026-04-15" calcext:value-type="date">
            <text:p>2026-04-1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. Introduc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3]+1" office:value-type="float" office:value="11" calcext:value-type="float">
            <text:p>11</text:p>
          </table:table-cell>
          <table:table-cell office:value-type="string" calcext:value-type="string">
            <text:p>Instructor</text:p>
          </table:table-cell>
          <table:table-cell table:formula="of:=[.D13]+7" office:value-type="date" office:date-value="2026-04-22" calcext:value-type="date">
            <text:p>2026-04-2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I. Cluster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4]+1" office:value-type="float" office:value="12" calcext:value-type="float">
            <text:p>12</text:p>
          </table:table-cell>
          <table:table-cell office:value-type="string" calcext:value-type="string">
            <text:p>Instructor</text:p>
          </table:table-cell>
          <table:table-cell table:formula="of:=[.D14]+7" office:value-type="date" office:date-value="2026-04-29" calcext:value-type="date">
            <text:p>2026-04-2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II. Dimension Reduction &amp; Manifold Learn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5]+1" office:value-type="float" office:value="13" calcext:value-type="float">
            <text:p>13</text:p>
          </table:table-cell>
          <table:table-cell office:value-type="string" calcext:value-type="string">
            <text:p>Instructor</text:p>
          </table:table-cell>
          <table:table-cell table:formula="of:=[.D15]+7" office:value-type="date" office:date-value="2026-05-06" calcext:value-type="date">
            <text:p>2026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V. Generative Mode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Instructor</text:p>
          </table:table-cell>
          <table:table-cell table:formula="of:=[.D16]+7" office:value-type="date" office:date-value="2026-05-13" calcext:value-type="date">
            <text:p>2026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Wrap-Up</text:p>
          </table:table-cell>
        </table:table-row>
        <table:table-row table:style-name="ro1">
          <table:table-cell office:value-type="string" calcext:value-type="string">
            <text:p>Exam Period</text:p>
          </table:table-cell>
          <table:table-cell table:number-columns-repeated="2"/>
          <table:table-cell table:formula="of:=[.D17]+7" office:value-type="date" office:date-value="2026-05-20" calcext:value-type="date">
            <text:p>2026-05-20</text:p>
          </table:table-cell>
          <table:table-cell/>
          <table:table-cell office:value-type="string" calcext:value-type="string">
            <text:p>Course Competition Final Presentations [Tentative]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s</text:p>
          </table:table-cell>
          <table:table-cell table:formula="of:=[.D6]" office:value-type="date" office:date-value="2026-02-25" calcext:value-type="date">
            <text:p>2026-02-25</text:p>
          </table:table-cell>
          <table:table-cell office:value-type="string" calcext:value-type="string">
            <text:p>6:15pm ET</text:p>
          </table:table-cell>
          <table:table-cell office:value-type="string" calcext:value-type="string">
            <text:p>Test I: Fundamentals of M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s</text:p>
          </table:table-cell>
          <table:table-cell table:formula="of:=[.D13]" office:value-type="date" office:date-value="2026-04-15" calcext:value-type="date">
            <text:p>2026-04-15</text:p>
          </table:table-cell>
          <table:table-cell office:value-type="string" calcext:value-type="string">
            <text:p>6:15pm ET</text:p>
          </table:table-cell>
          <table:table-cell office:value-type="string" calcext:value-type="string">
            <text:p>Test II: Supervised Learnin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s</text:p>
          </table:table-cell>
          <table:table-cell table:formula="of:=[.D17]" office:value-type="date" office:date-value="2026-05-13" calcext:value-type="date">
            <text:p>2026-05-13</text:p>
          </table:table-cell>
          <table:table-cell office:value-type="string" calcext:value-type="string">
            <text:p>6:15pm ET</text:p>
          </table:table-cell>
          <table:table-cell office:value-type="string" calcext:value-type="string">
            <text:p>Test III: Unsupervised Learning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Instructor</text:p>
          </table:table-cell>
          <table:table-cell table:formula="of:=[.D5]" office:value-type="date" office:date-value="2026-02-18" calcext:value-type="date">
            <text:p>2026-02-18</text:p>
          </table:table-cell>
          <table:table-cell office:value-type="string" calcext:value-type="string">
            <text:p>8:30pm ET</text:p>
          </table:table-cell>
          <table:table-cell office:value-type="string" calcext:value-type="string">
            <text:p>Prediction Competition Opened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table:formula="of:=[.D18]" office:value-type="date" office:date-value="2026-05-20" calcext:value-type="date">
            <text:p>2026-05-20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In-Class Presentations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office:value-type="date" office:date-value="2026-05-26" calcext:value-type="date">
            <text:p>2026-05-26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Report</text:p>
          </table:table-cell>
        </table:table-row>
        <table:table-row table:style-name="ro1">
          <table:table-cell office:value-type="string" calcext:value-type="string">
            <text:p>Syllabus Quiz</text:p>
          </table:table-cell>
          <table:table-cell/>
          <table:table-cell office:value-type="string" calcext:value-type="string">
            <text:p>Students</text:p>
          </table:table-cell>
          <table:table-cell office:value-type="date" office:date-value="2026-02-12" calcext:value-type="date">
            <text:p>2026-02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Syllabus Quiz on Brightspace for Verification of Enrollment</text:p>
          </table:table-cell>
        </table:table-row>
      </table:table>
      <table:named-expressions/>
      <table:database-ranges>
        <table:database-range table:name="__Anonymous_Sheet_DB__0" table:target-range-address="key_dates.A1:key_dates.F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14:04:19.48557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3T10:13:35.163828000</dc:date>
    <meta:editing-duration>P4DT20H26M14S</meta:editing-duration>
    <meta:editing-cycles>20</meta:editing-cycles>
    <meta:generator>LibreOffice/25.2.5.2$MacOSX_AARCH64 LibreOffice_project/03d19516eb2e1dd5d4ccd751a0d6f35f35e08022</meta:generator>
    <meta:document-statistic meta:table-count="1" meta:cell-count="139" meta:object-count="0"/>
  </office:meta>
</office:document-meta>
</file>